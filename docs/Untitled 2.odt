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M Mono 12" svg:font-family="'LM Mono 12'" style:font-pitch="variable"/>
    <style:font-face style:name="LM Roman 12" svg:font-family="'LM Roman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M Mono 12" fo:font-size="12pt" officeooo:rsid="0006455f" style:font-size-asian="10.5pt" style:font-size-complex="12pt"/>
    </style:style>
    <style:style style:name="T1" style:family="text">
      <style:text-properties style:font-name="LM Mono 12" fo:font-size="12pt" style:font-size-asian="10.5pt" style:font-size-complex="12pt"/>
    </style:style>
    <style:style style:name="T2" style:family="text">
      <style:text-properties style:font-name="LM Roman 12" fo:font-size="12pt" style:font-size-asian="10.5pt" style:font-size-complex="12pt"/>
    </style:style>
    <style:style style:name="T3" style:family="text">
      <style:text-properties style:font-name="LM Roman 12" fo:font-size="12pt" officeooo:rsid="0006455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zione</text:p>
      <text:h text:style-name="Heading_20_1" text:outline-level="1"><text:s/>Introduzione</text:h>
      <text:p text:style-name="Text_20_body">Il framework <text:span text:style-name="T1">libmr</text:span><text:span text:style-name="T2"> </text:span><text:span text:style-name="T3">è organizzato nel seguente modo: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M Mono 12" svg:font-family="'LM Mono 12'" style:font-pitch="variable"/>
    <style:font-face style:name="LM Roman 12" svg:font-family="'LM Roman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M Roman 12" fo:font-family="'LM Roman 12'" style:font-pitch="variable" fo:language="it" fo:country="IT" officeooo:rsid="00042dd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M Roman 12" fo:font-family="'LM Roman 12'" style:font-pitch="variable" fo:font-size="28pt" fo:language="it" fo:country="IT" fo:font-weight="bold" officeooo:rsid="00042dd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LM Roman 12" fo:font-family="'LM Roman 12'" style:font-pitch="variable" fo:font-size="18pt" fo:language="it" fo:country="I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3T19:59:02.338562964</meta:creation-date>
    <meta:generator>LibreOffice/26.2.3.2$Linux_X86_64 LibreOffice_project/620$Build-2</meta:generator>
    <dc:date>2026-05-23T20:17:06.598543098</dc:date>
    <meta:editing-duration>PT17M52S</meta:editing-duration>
    <meta:editing-cycles>4</meta:editing-cycles>
    <meta:document-statistic meta:table-count="0" meta:image-count="0" meta:object-count="0" meta:page-count="1" meta:paragraph-count="3" meta:word-count="11" meta:character-count="75" meta:non-whitespace-character-count="67"/>
  </office:meta>
</office:document-meta>
</file>